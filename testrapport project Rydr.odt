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3" style:family="paragraph"/>
    <style:style style:name="P21" style:parent-style-name="Lijstalinea" style:list-style-name="LFO3" style:family="paragraph"/>
    <style:style style:name="P22" style:parent-style-name="Lijstalinea" style:list-style-name="LFO3" style:family="paragraph"/>
    <style:style style:name="P23" style:parent-style-name="Lijstalinea" style:list-style-name="LFO3" style:family="paragraph"/>
    <style:style style:name="P24" style:parent-style-name="Lijstalinea" style:list-style-name="LFO3" style:family="paragraph"/>
    <style:style style:name="P25" style:parent-style-name="Lijstalinea" style:list-style-name="LFO3" style:family="paragraph"/>
    <style:style style:name="P26" style:parent-style-name="Lijstalinea" style:list-style-name="LFO4" style:family="paragraph"/>
    <style:style style:name="P27" style:parent-style-name="Lijstalinea" style:list-style-name="LFO4" style:family="paragraph"/>
    <style:style style:name="P28" style:parent-style-name="Lijstalinea" style:list-style-name="LFO4" style:family="paragraph"/>
    <style:style style:name="P29" style:parent-style-name="Lijstalinea" style:list-style-name="LFO4" style:family="paragraph"/>
  </office:automatic-styles>
  <office:body>
    <office:text text:use-soft-page-breaks="true">
      <text:p text:style-name="P1">Welke functionaliteiten je hebt getest?</text:p>
      <text:list text:style-name="LFO1" text:continue-numbering="true">
        <text:list-item>
          <text:p text:style-name="P2">Inlogen<text:s/></text:p>
        </text:list-item>
        <text:list-item>
          <text:p text:style-name="P3">Op huur nu klikken</text:p>
        </text:list-item>
        <text:list-item>
          <text:p text:style-name="P4">Zoek balk</text:p>
        </text:list-item>
        <text:list-item>
          <text:p text:style-name="P5">Over ons</text:p>
        </text:list-item>
        <text:list-item>
          <text:p text:style-name="P6">Community</text:p>
        </text:list-item>
        <text:list-item>
          <text:p text:style-name="P7">Socials</text:p>
        </text:list-item>
      </text:list>
      <text:p text:style-name="Standaard">Welke tests heb je uitgevoerd?</text:p>
      <text:list text:style-name="LFO1" text:continue-numbering="true">
        <text:list-item>
          <text:p text:style-name="P8">Inlogen<text:s/></text:p>
        </text:list-item>
        <text:list-item>
          <text:p text:style-name="P9">Op huur nu klikken</text:p>
        </text:list-item>
        <text:list-item>
          <text:p text:style-name="P10">Zoek balk</text:p>
        </text:list-item>
        <text:list-item>
          <text:p text:style-name="P11">Over ons</text:p>
        </text:list-item>
        <text:list-item>
          <text:p text:style-name="P12">Community</text:p>
        </text:list-item>
        <text:list-item>
          <text:p text:style-name="P13">Socials</text:p>
        </text:list-item>
      </text:list>
      <text:p text:style-name="Standaard">Wat was de verwachte<text:s/>uitkomst?</text:p>
      <text:list text:style-name="LFO2" text:continue-numbering="true">
        <text:list-item>
          <text:p text:style-name="P14">Dat je je profiel kon zien en dat je verder kon met een account</text:p>
        </text:list-item>
        <text:list-item>
          <text:p text:style-name="P15">Dat je de auto met alle informatie ziet</text:p>
        </text:list-item>
        <text:list-item>
          <text:p text:style-name="P16">Dat je een auto naam opzoekt en dat die tevoorschijn komt</text:p>
        </text:list-item>
        <text:list-item>
          <text:p text:style-name="P17">Dat alles over het bedrijf te zien is bij alle stukken zoals het team</text:p>
        </text:list-item>
        <text:list-item>
          <text:p text:style-name="P18">Dat je op<text:s/>alles kan klikken en alles het doet</text:p>
        </text:list-item>
        <text:list-item>
          <text:p text:style-name="P19">Dat alle socials geconnect zijn en dat je naar de socials gestuurd wordt</text:p>
        </text:list-item>
      </text:list>
      <text:p text:style-name="Standaard">Wat was de daadwerkelijke uitkomst?</text:p>
      <text:list text:style-name="LFO3" text:continue-numbering="true">
        <text:list-item>
          <text:p text:style-name="P20">Fout melding<text:s/></text:p>
        </text:list-item>
        <text:list-item>
          <text:p text:style-name="P21">Je zag alleen de koeging wanneer je op huur nu drukte</text:p>
        </text:list-item>
        <text:list-item>
          <text:p text:style-name="P22">Je kwam weer bij de thuis pagina</text:p>
        </text:list-item>
        <text:list-item>
          <text:p text:style-name="P23">De pagina’s deden het niet</text:p>
        </text:list-item>
        <text:list-item>
          <text:p text:style-name="P24">De pagina’s doen het niet<text:s/></text:p>
        </text:list-item>
        <text:list-item>
          <text:p text:style-name="P25">De pagina’s doen het niet</text:p>
        </text:list-item>
      </text:list>
      <text:p text:style-name="Standaard">Eventuele bugs en hoe heb je die opgelost?</text:p>
      <text:list text:style-name="LFO4" text:continue-numbering="true">
        <text:list-item>
          <text:p text:style-name="P26">Huur nu knop deed het niet. Opgelost door de button te linken naar ons aanbod</text:p>
        </text:list-item>
        <text:list-item>
          <text:p text:style-name="P27">Inlogpagina deed het niet. Opgelost door een inlogpagina te maken</text:p>
        </text:list-item>
        <text:list-item>
          <text:p text:style-name="P28">Auto’s niet zichtbaar. Opgelost door database connecten en webp afbeeldingen maken.</text:p>
        </text:list-item>
        <text:list-item>
          <text:p text:style-name="P29"/>
        </text:list-item>
      </text:list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Gaudencio Gato</meta:initial-creator>
    <dc:creator>pedro gato</dc:creator>
    <meta:creation-date>2026-04-08T11:34:00Z</meta:creation-date>
    <dc:date>2026-04-08T11:34:00Z</dc:date>
    <meta:template xlink:href="Normal" xlink:type="simple"/>
    <meta:editing-cycles>2</meta:editing-cycles>
    <meta:editing-duration>PT60S</meta:editing-duration>
    <meta:document-statistic meta:page-count="1" meta:paragraph-count="2" meta:word-count="165" meta:character-count="1071" meta:row-count="7" meta:non-whitespace-character-count="908"/>
  </office:meta>
</office:document-meta>
</file>