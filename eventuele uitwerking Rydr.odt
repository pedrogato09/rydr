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weight="bold" style:font-weight-asian="bold" style:font-weight-complex="bold"/>
    </style:style>
    <style:style style:name="T3" style:parent-style-name="Standaardalinea-lettertype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62336" draw:style-name="a0" draw:name="Afbeelding 5" text:anchor-type="paragraph" svg:x="1.83125in" svg:y="1.52639in" svg:width="3.92708in" svg:height="1.8824in" style:rel-width="scale" style:rel-height="scale"><draw:image xlink:href="media/image1.png" xlink:type="simple" xlink:show="embed" xlink:actuate="onLoad"/><svg:title/><svg:desc/></draw:frame></text:span><text:span text:style-name="T3"><draw:frame draw:z-index="251661312" draw:style-name="a1" draw:name="Afbeelding 4" text:anchor-type="paragraph" svg:x="1.90417in" svg:y="-0.73403in" svg:width="3.95612in" svg:height="1.72917in" style:rel-width="scale" style:rel-height="scale"><draw:image xlink:href="media/image2.png" xlink:type="simple" xlink:show="embed" xlink:actuate="onLoad"/><svg:title/><svg:desc/></draw:frame></text:span>Beginpagina met filter<text:s/>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>Ons aanbod pagina</text:p>
      <text:p text:style-name="Standaard"/>
      <text:p text:style-name="Standaard"/>
      <text:p text:style-name="Standaard"/>
      <text:p text:style-name="Standaard"><draw:frame draw:z-index="251660288" draw:style-name="a2" draw:name="Afbeelding 3" text:anchor-type="paragraph" svg:x="2.95347in" svg:y="0.24306in" svg:width="3.9576in" svg:height="2.43746in" style:rel-width="scale" style:rel-height="scale"><draw:image xlink:href="media/image3.png" xlink:type="simple" xlink:show="embed" xlink:actuate="onLoad"/><svg:title/><svg:desc/></draw:frame></text:p>
      <text:p text:style-name="Standaard"/>
      <text:p text:style-name="Standaard"/>
      <text:p text:style-name="Standaard"/>
      <text:p text:style-name="Standaard"><draw:frame draw:z-index="251663360" draw:style-name="a3" draw:name="Afbeelding 6" text:anchor-type="paragraph" svg:x="2.96389in" svg:y="2.31458in" svg:width="3.91458in" svg:height="1.84375in" style:rel-width="scale" style:rel-height="scale"><draw:image xlink:href="media/image4.png" xlink:type="simple" xlink:show="embed" xlink:actuate="onLoad"/><svg:title/><svg:desc/></draw:frame>Ons aanbod pagina met weerkende filter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>Auto’s met informati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edro gato</meta:initial-creator>
    <dc:creator>pedro gato</dc:creator>
    <meta:creation-date>2026-04-09T12:20:00Z</meta:creation-date>
    <dc:date>2026-04-10T08:21:00Z</dc:date>
    <meta:template xlink:href="Normal" xlink:type="simple"/>
    <meta:editing-cycles>2</meta:editing-cycles>
    <meta:editing-duration>PT72000S</meta:editing-duration>
    <meta:document-statistic meta:page-count="1" meta:paragraph-count="1" meta:word-count="19" meta:character-count="127" meta:row-count="1" meta:non-whitespace-character-count="109"/>
  </office:meta>
</office:document-meta>
</file>